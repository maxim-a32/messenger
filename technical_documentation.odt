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17d571" officeooo:paragraph-rsid="00149aba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149aba" officeooo:paragraph-rsid="00149aba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153cc3" officeooo:paragraph-rsid="00153cc3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1ca415" officeooo:paragraph-rsid="001ca415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1cc107" officeooo:paragraph-rsid="001cc10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1d37d2" officeooo:paragraph-rsid="001d37d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1e5e6a" officeooo:paragraph-rsid="001e5e6a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0in" fo:margin-top="0in" fo:margin-bottom="0.1665in" style:contextual-spacing="false" fo:text-align="center" style:justify-single-word="false" fo:text-indent="0in" style:auto-text-indent="false" fo:break-before="page"/>
      <style:text-properties style:font-name="Times New Roman" fo:font-size="14pt" fo:language="ru" fo:country="RU" fo:font-weight="bold" officeooo:rsid="0017d571" officeooo:paragraph-rsid="00149aba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en" fo:country="US" fo:font-weight="normal" officeooo:rsid="001ad585" officeooo:paragraph-rsid="001ad585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en" fo:country="US" fo:font-weight="normal" officeooo:rsid="001cc107" officeooo:paragraph-rsid="001cc107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in" fo:margin-right="0in" fo:margin-top="0in" fo:margin-bottom="0.1665in" style:contextual-spacing="false" fo:text-align="center" style:justify-single-word="false" fo:text-indent="0in" style:auto-text-indent="false" fo:break-before="page"/>
      <style:text-properties style:font-name="Times New Roman" fo:font-size="14pt" fo:language="ru" fo:country="RU" fo:font-weight="bold" officeooo:rsid="001ca415" officeooo:paragraph-rsid="001ca415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4899"/>
    </style:style>
    <style:style style:name="T3" style:family="text">
      <style:text-properties fo:language="en" fo:country="US" officeooo:rsid="0017da9e"/>
    </style:style>
    <style:style style:name="T4" style:family="text">
      <style:text-properties fo:language="en" fo:country="US" officeooo:rsid="0019c809"/>
    </style:style>
    <style:style style:name="T5" style:family="text">
      <style:text-properties fo:language="en" fo:country="US" officeooo:rsid="001e5e6a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ca415"/>
    </style:style>
    <style:style style:name="T8" style:family="text">
      <style:text-properties officeooo:rsid="00153cc3"/>
    </style:style>
    <style:style style:name="T9" style:family="text">
      <style:text-properties officeooo:rsid="00162216"/>
    </style:style>
    <style:style style:name="T10" style:family="text">
      <style:text-properties officeooo:rsid="001ca415"/>
    </style:style>
    <style:style style:name="T11" style:family="text">
      <style:text-properties officeooo:rsid="001cc1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Розділ 1 опис програмного коду</text:p>
      <text:p text:style-name="P1">цей розділ присвячений опису коду ПЗ, це отрібно щоб краще зрозуміти як він працює</text:p>
      <text:p text:style-name="P2">Технічна документація: Програма це <text:span text:style-name="T9">консольний</text:span> інтерфейс <text:span text:style-name="T1">CLI <text:s/></text:span>в якому є <text:span text:style-name="T8">дві</text:span> функції а саме<text:span text:style-name="T1"> </text:span><text:span text:style-name="T2">main</text:span>,<text:span text:style-name="T1"> </text:span><text:span text:style-name="T3">receive_</text:span><text:span text:style-name="T4">messages</text:span>.</text:p>
      <text:p text:style-name="P9">main – <text:span text:style-name="T6">відповідає за надсилання і читання збережених повідомлень, </text:span><text:span text:style-name="T7">реєстрацію на сайті, запускає в асинхроному режимі </text:span><text:span text:style-name="T10">receive_messages</text:span></text:p>
      <text:p text:style-name="P9">re<text:span text:style-name="T10">ceive_messages – </text:span><text:span text:style-name="T7">приймає і зберігає повідомлення</text:span></text:p>
      <text:p text:style-name="P10"><text:span text:style-name="T7">п</text:span><text:span text:style-name="T6">овідомлення зберігаються в файлі </text:span>chat history</text:p>
      <text:p text:style-name="P6">логи клієнта зберігаються в файл <text:span text:style-name="T5">app_log_client</text:span></text:p>
      <text:p text:style-name="P7">логи сервера зберігаються в файл <text:span text:style-name="T1">app_log_server</text:span></text:p>
      <text:p text:style-name="P11">Розділ 2 Інструкція з використання</text:p>
      <text:p text:style-name="P4">коли користувач запускає програму програма запитує ім’я користувача післявведення можна буде виконувати інші дії</text:p>
      <text:p text:style-name="P4">читання повідомлень: треба <text:span text:style-name="T11">вести</text:span> 1</text:p>
      <text:p text:style-name="P5">написання повідомлень: треба натиснути <text:span text:style-name="T1">enter </text:span>потім вести отримувача і текст повідолення, потім програма запитає чи хочете ви відправити фаїл, якщо хочете відправити фаїл відправте 1 потім тоді програма запитає повний шлях до файлу якщо ви не хочете відправляти фаїл відправте будь що крім 1.</text:p>
      <text:p text:style-name="P3">Всі повідомлення зберігаються в файлі <text:span text:style-name="T1">chat history.txt, <text:s/></text:span>але з програми не можна відкрити файли тому вони зберігаються в тійже папці де знахдиться програма, всі повідомлення зберігаються автоматично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5-25T16:29:13.562000000</dc:date>
    <meta:editing-duration>PT5M55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13" meta:word-count="169" meta:character-count="1217" meta:non-whitespace-character-count="1057"/>
  </office:meta>
</office:document-meta>
</file>