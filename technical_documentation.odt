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ru" fo:country="RU" fo:font-weight="normal" officeooo:rsid="0017d571" officeooo:paragraph-rsid="00149aba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ru" fo:country="RU" fo:font-weight="normal" officeooo:rsid="00149aba" officeooo:paragraph-rsid="00149aba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ru" fo:country="RU" fo:font-weight="normal" officeooo:rsid="00153cc3" officeooo:paragraph-rsid="00153cc3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ru" fo:country="RU" fo:font-weight="normal" officeooo:rsid="001ca415" officeooo:paragraph-rsid="001ca415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ru" fo:country="RU" fo:font-weight="normal" officeooo:rsid="001cc107" officeooo:paragraph-rsid="001cc107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ru" fo:country="RU" fo:font-weight="normal" officeooo:rsid="001d37d2" officeooo:paragraph-rsid="001d37d2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ru" fo:country="RU" fo:font-weight="normal" officeooo:rsid="001e5e6a" officeooo:paragraph-rsid="001e5e6a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ru" fo:country="RU" fo:font-weight="normal" officeooo:rsid="001876d6" officeooo:paragraph-rsid="00238c9a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0in" fo:margin-top="0in" fo:margin-bottom="0.1665in" style:contextual-spacing="false" fo:text-align="center" style:justify-single-word="false" fo:text-indent="0in" style:auto-text-indent="false" fo:break-before="page"/>
      <style:text-properties style:font-name="Times New Roman" fo:font-size="14pt" fo:language="ru" fo:country="RU" fo:font-weight="bold" officeooo:rsid="001ca415" officeooo:paragraph-rsid="001ca415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in" fo:margin-right="0in" fo:margin-top="0in" fo:margin-bottom="0.1665in" style:contextual-spacing="false" fo:text-align="center" style:justify-single-word="false" fo:text-indent="0in" style:auto-text-indent="false" fo:break-before="page"/>
      <style:text-properties style:font-name="Times New Roman" fo:font-size="14pt" fo:language="ru" fo:country="RU" fo:font-weight="bold" officeooo:rsid="0017d571" officeooo:paragraph-rsid="00149aba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in" fo:margin-right="0in" fo:margin-top="0in" fo:margin-bottom="0.1665in" style:contextual-spacing="false" fo:text-align="center" style:justify-single-word="false" fo:text-indent="0in" style:auto-text-indent="false" fo:break-before="page"/>
      <style:text-properties style:font-name="Times New Roman" fo:font-size="14pt" fo:language="ru" fo:country="RU" fo:font-weight="bold" officeooo:rsid="00209d90" officeooo:paragraph-rsid="00238c9a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in" fo:margin-right="0in" fo:margin-top="0in" fo:margin-bottom="0.1665in" style:contextual-spacing="false" fo:text-align="center" style:justify-single-word="false" fo:text-indent="0in" style:auto-text-indent="false"/>
      <style:text-properties style:font-name="Times New Roman" fo:font-size="14pt" fo:language="ru" fo:country="RU" fo:font-weight="bold" officeooo:rsid="001876d6" officeooo:paragraph-rsid="00238c9a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en" fo:country="US" fo:font-weight="normal" officeooo:rsid="001ad585" officeooo:paragraph-rsid="001ad585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en" fo:country="US" fo:font-weight="normal" officeooo:rsid="001cc107" officeooo:paragraph-rsid="001cc107" style:font-size-asian="14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54899"/>
    </style:style>
    <style:style style:name="T3" style:family="text">
      <style:text-properties fo:language="en" fo:country="US" officeooo:rsid="0017da9e"/>
    </style:style>
    <style:style style:name="T4" style:family="text">
      <style:text-properties fo:language="en" fo:country="US" officeooo:rsid="0019c809"/>
    </style:style>
    <style:style style:name="T5" style:family="text">
      <style:text-properties fo:language="en" fo:country="US" officeooo:rsid="001e5e6a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1ca415"/>
    </style:style>
    <style:style style:name="T8" style:family="text">
      <style:text-properties officeooo:rsid="00153cc3"/>
    </style:style>
    <style:style style:name="T9" style:family="text">
      <style:text-properties officeooo:rsid="00162216"/>
    </style:style>
    <style:style style:name="T10" style:family="text">
      <style:text-properties officeooo:rsid="001ca415"/>
    </style:style>
    <style:style style:name="T11" style:family="text">
      <style:text-properties officeooo:rsid="001cc107"/>
    </style:style>
    <style:style style:name="T12" style:family="text">
      <style:text-properties officeooo:rsid="00218ff7"/>
    </style:style>
    <style:style style:name="T13" style:family="text">
      <style:text-properties officeooo:rsid="0017d571"/>
    </style:style>
    <style:style style:name="T14" style:family="text">
      <style:text-properties officeooo:rsid="0064ecef"/>
    </style:style>
    <style:style style:name="T15" style:family="text">
      <style:text-properties officeooo:rsid="002643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Сандул Максим (КН32)</text:p>
      <text:p text:style-name="P12">ЗМІСТ</text:p>
      <text:p text:style-name="P8"><text:span text:style-name="T13">Розділ 1 </text:span><text:span text:style-name="T15">О</text:span><text:span text:style-name="T13">пис програмного коду…………………………………………</text:span>сторінка 2 <text:span text:style-name="T14">Р</text:span><text:span text:style-name="T13">озділ 2 Інструкція з використання………………………………………</text:span>сторінка 3</text:p>
      <text:p text:style-name="P10">Розділ 1 <text:span text:style-name="T15">О</text:span>пис програмного коду</text:p>
      <text:p text:style-name="P1"><text:span text:style-name="T12">Ц</text:span>ей розділ присвячений опису коду ПЗ, це <text:span text:style-name="T12">п</text:span>отрібно щоб краще зрозуміти як він працює.</text:p>
      <text:p text:style-name="P2">Технічна документація: Програма це <text:span text:style-name="T9">консольний</text:span> інтерфейс <text:span text:style-name="T1">CLI <text:s/></text:span>в якому є <text:span text:style-name="T8">дві</text:span> функції а саме<text:span text:style-name="T1"> </text:span><text:span text:style-name="T2">main</text:span>,<text:span text:style-name="T1"> </text:span><text:span text:style-name="T3">receive_</text:span><text:span text:style-name="T4">messages</text:span>.</text:p>
      <text:p text:style-name="P13">main – <text:span text:style-name="T6">відповідає за надсилання і читання збережених повідомлень, </text:span><text:span text:style-name="T7">реєстрацію на сайті, запускає в асинхроному режимі </text:span><text:span text:style-name="T10">receive_messages;</text:span></text:p>
      <text:p text:style-name="P13">re<text:span text:style-name="T10">ceive_messages – </text:span><text:span text:style-name="T7">приймає і зберігає повідомлення;</text:span></text:p>
      <text:p text:style-name="P14"><text:span text:style-name="T7">п</text:span><text:span text:style-name="T6">овідомлення зберігаються в файлі </text:span>chat history;</text:p>
      <text:p text:style-name="P6">логи клієнта зберігаються в файл <text:span text:style-name="T5">app_log_client;</text:span></text:p>
      <text:p text:style-name="P7">логи сервера зберігаються в файл <text:span text:style-name="T1">app_log_server.</text:span></text:p>
      <text:p text:style-name="P9">Розділ 2 Інструкція з використання</text:p>
      <text:p text:style-name="P4"><text:span text:style-name="T12">К</text:span>оли користувач запускає програму програма запитує ім’я користувача післявведення можна буде виконувати інші дії.</text:p>
      <text:p text:style-name="P4"><text:span text:style-name="T12">Ч</text:span>итання повідомлень: треба <text:span text:style-name="T11">вести</text:span> 1.</text:p>
      <text:p text:style-name="P5"><text:span text:style-name="T12">Н</text:span>аписання повідомлень: треба натиснути <text:span text:style-name="T1">enter </text:span>потім вести отримувача і текст повідолення, потім програма запитає чи хочете ви відправити фаїл, якщо хочете відправити фаїл відправте 1 потім тоді програма запитає повний шлях до файлу якщо ви не хочете відправляти фаїл відправте будь що крім 1.</text:p>
      <text:p text:style-name="P3">Всі повідомлення зберігаються в файлі <text:span text:style-name="T1">chat history.txt, <text:s/></text:span>але з програми не можна відкрити файли тому вони зберігаються в тійже папці де знахдиться програма, всі повідомлення зберігаються автоматично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5-26T12:15:50.576000000</dc:date>
    <meta:editing-duration>PT11M36S</meta:editing-duration>
    <meta:editing-cycles>5</meta:editing-cycles>
    <meta:generator>LibreOffice/7.3.5.2$Windows_X86_64 LibreOffice_project/184fe81b8c8c30d8b5082578aee2fed2ea847c01</meta:generator>
    <meta:document-statistic meta:table-count="0" meta:image-count="0" meta:object-count="0" meta:page-count="3" meta:paragraph-count="16" meta:word-count="185" meta:character-count="1368" meta:non-whitespace-character-count="1195"/>
  </office:meta>
</office:document-meta>
</file>