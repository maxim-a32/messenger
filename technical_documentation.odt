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7d571" officeooo:paragraph-rsid="00149aba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53cc3" officeooo:paragraph-rsid="00153cc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ca415" officeooo:paragraph-rsid="001ca415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d37d2" officeooo:paragraph-rsid="002b05c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/>
      <style:text-properties style:font-name="Times New Roman" fo:font-size="14pt" fo:language="ru" fo:country="RU" fo:font-weight="normal" officeooo:rsid="001d37d2" officeooo:paragraph-rsid="002b05c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49aba" officeooo:paragraph-rsid="002a5d3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49aba" officeooo:paragraph-rsid="002bf36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49aba" officeooo:paragraph-rsid="002de41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cc107" officeooo:paragraph-rsid="001cc10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331c0f" officeooo:paragraph-rsid="00331c0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 fo:break-before="page"/>
      <style:text-properties style:font-name="Times New Roman" fo:font-size="14pt" fo:language="ru" fo:country="RU" fo:font-weight="bold" officeooo:rsid="001ca415" officeooo:paragraph-rsid="001ca41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 fo:break-before="page"/>
      <style:text-properties style:font-name="Times New Roman" fo:font-size="14pt" fo:language="ru" fo:country="RU" fo:font-weight="bold" officeooo:rsid="0017d571" officeooo:paragraph-rsid="00149ab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 fo:break-before="page"/>
      <style:text-properties style:font-name="Times New Roman" fo:font-size="14pt" fo:language="ru" fo:country="RU" fo:font-weight="bold" officeooo:rsid="00209d90" officeooo:paragraph-rsid="00238c9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/>
      <style:text-properties style:font-name="Times New Roman" fo:font-size="14pt" fo:language="ru" fo:country="RU" fo:font-weight="bold" officeooo:rsid="001876d6" officeooo:paragraph-rsid="00238c9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fo:font-weight="normal" officeooo:rsid="001cc107" officeooo:paragraph-rsid="001cc10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fo:font-weight="normal" officeooo:rsid="001ad585" officeooo:paragraph-rsid="001ad585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fo:font-weight="normal" officeooo:rsid="0027632f" officeooo:paragraph-rsid="001ad585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fo:font-weight="normal" officeooo:rsid="002c9570" officeooo:paragraph-rsid="002c957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fo:font-weight="normal" officeooo:rsid="002de41d" officeooo:paragraph-rsid="002de41d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fo:font-weight="normal" officeooo:rsid="002fd7e9" officeooo:paragraph-rsid="002fd7e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fo:font-weight="normal" officeooo:rsid="002fd7e9" officeooo:paragraph-rsid="0030a91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fo:font-weight="normal" officeooo:rsid="002fd7e9" officeooo:paragraph-rsid="00324942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/>
      <style:text-properties style:font-name="Times New Roman" fo:font-size="14pt" fo:language="en" fo:country="US" fo:font-weight="bold" officeooo:rsid="002b05ce" officeooo:paragraph-rsid="002b05ce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876d6" officeooo:paragraph-rsid="0036f7fe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d37d2" officeooo:paragraph-rsid="0036f7fe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fo:font-weight="normal" officeooo:rsid="002b05ce" officeooo:paragraph-rsid="0036f7fe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4899"/>
    </style:style>
    <style:style style:name="T3" style:family="text">
      <style:text-properties fo:language="en" fo:country="US" officeooo:rsid="0017da9e"/>
    </style:style>
    <style:style style:name="T4" style:family="text">
      <style:text-properties fo:language="en" fo:country="US" officeooo:rsid="0019c809"/>
    </style:style>
    <style:style style:name="T5" style:family="text">
      <style:text-properties fo:language="en" fo:country="US" officeooo:rsid="001e5e6a"/>
    </style:style>
    <style:style style:name="T6" style:family="text">
      <style:text-properties fo:language="en" fo:country="US" officeooo:rsid="0027632f"/>
    </style:style>
    <style:style style:name="T7" style:family="text">
      <style:text-properties fo:language="en" fo:country="US" officeooo:rsid="0027902f"/>
    </style:style>
    <style:style style:name="T8" style:family="text">
      <style:text-properties fo:language="en" fo:country="US" officeooo:rsid="002a5d32"/>
    </style:style>
    <style:style style:name="T9" style:family="text">
      <style:text-properties fo:language="en" fo:country="US" officeooo:rsid="002b05ce"/>
    </style:style>
    <style:style style:name="T10" style:family="text">
      <style:text-properties fo:language="en" fo:country="US" officeooo:rsid="0035d72d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ca415"/>
    </style:style>
    <style:style style:name="T13" style:family="text">
      <style:text-properties fo:language="ru" fo:country="RU" officeooo:rsid="0030a917"/>
    </style:style>
    <style:style style:name="T14" style:family="text">
      <style:text-properties fo:language="ru" fo:country="RU" officeooo:rsid="00324942"/>
    </style:style>
    <style:style style:name="T15" style:family="text">
      <style:text-properties fo:language="ru" fo:country="RU" officeooo:rsid="0036f7fe"/>
    </style:style>
    <style:style style:name="T16" style:family="text">
      <style:text-properties officeooo:rsid="001ca415"/>
    </style:style>
    <style:style style:name="T17" style:family="text">
      <style:text-properties officeooo:rsid="00218ff7"/>
    </style:style>
    <style:style style:name="T18" style:family="text">
      <style:text-properties officeooo:rsid="0017d571"/>
    </style:style>
    <style:style style:name="T19" style:family="text">
      <style:text-properties officeooo:rsid="0064ecef"/>
    </style:style>
    <style:style style:name="T20" style:family="text">
      <style:text-properties officeooo:rsid="0026435d"/>
    </style:style>
    <style:style style:name="T21" style:family="text">
      <style:text-properties officeooo:rsid="0027632f"/>
    </style:style>
    <style:style style:name="T22" style:family="text">
      <style:text-properties officeooo:rsid="001e5e6a"/>
    </style:style>
    <style:style style:name="T23" style:family="text">
      <style:text-properties officeooo:rsid="0028f019"/>
    </style:style>
    <style:style style:name="T24" style:family="text">
      <style:text-properties fo:font-weight="bold" officeooo:rsid="0028f019" style:font-weight-asian="bold" style:font-weight-complex="bold"/>
    </style:style>
    <style:style style:name="T25" style:family="text">
      <style:text-properties fo:font-weight="bold" officeooo:rsid="002b05ce" style:font-weight-asian="bold" style:font-weight-complex="bold"/>
    </style:style>
    <style:style style:name="T26" style:family="text">
      <style:text-properties officeooo:rsid="002bf369"/>
    </style:style>
    <style:style style:name="T27" style:family="text">
      <style:text-properties officeooo:rsid="002de41d"/>
    </style:style>
    <style:style style:name="T28" style:family="text">
      <style:text-properties officeooo:rsid="0030a917"/>
    </style:style>
    <style:style style:name="T29" style:family="text">
      <style:text-properties officeooo:rsid="00324942"/>
    </style:style>
    <style:style style:name="T30" style:family="text">
      <style:text-properties officeooo:rsid="00331c0f"/>
    </style:style>
    <style:style style:name="T31" style:family="text">
      <style:text-properties officeooo:rsid="0033dae4"/>
    </style:style>
    <style:style style:name="T32" style:family="text">
      <style:text-properties officeooo:rsid="0036f7fe"/>
    </style:style>
    <style:style style:name="T33" style:family="text">
      <style:text-properties officeooo:rsid="002b05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Сандул Максим (КН32)</text:p>
      <text:p text:style-name="P14">ЗМІСТ</text:p>
      <text:p text:style-name="P24"><text:span text:style-name="T18">Розділ 1 </text:span><text:span text:style-name="T20">О</text:span><text:span text:style-name="T18">пис програмного коду…………………………………………</text:span>сторінка 2</text:p>
      <text:p text:style-name="P26">1.1 <text:span text:style-name="T11">Опис програмної частини……………………………………………..</text:span><text:span text:style-name="T15">сторінка 2</text:span></text:p>
      <text:p text:style-name="P25"><text:span text:style-name="T33">1.2 </text:span><text:span text:style-name="T23">Опис коду графічного інтерфейсу……………………………………</text:span><text:span text:style-name="T32">сторінка 2</text:span></text:p>
      <text:p text:style-name="P24"><text:span text:style-name="T19">Р</text:span><text:span text:style-name="T18">озділ 2 Інструкція з використання………………………………………</text:span>сторінка <text:span text:style-name="T29">4</text:span></text:p>
      <text:p text:style-name="P12">Розділ 1 <text:span text:style-name="T20">О</text:span>пис програмного коду</text:p>
      <text:p text:style-name="P1"><text:span text:style-name="T17">Ц</text:span>ей розділ присвячений опису коду ПЗ, це <text:span text:style-name="T17">п</text:span>отрібно щоб краще зрозуміти як він працює.</text:p>
      <text:p text:style-name="P6">Технічна документація: Програма <text:span text:style-name="T23">поділена</text:span> <text:span text:style-name="T23">на два файли перший відповідає за програмну частину і зв’язок із сервером, має такі функції </text:span><text:span text:style-name="T2">main</text:span>,<text:span text:style-name="T1"> </text:span><text:span text:style-name="T3">receive_</text:span><text:span text:style-name="T4">messages, </text:span><text:span text:style-name="T6">messeg, history,</text:span><text:span text:style-name="T23"> друга це графічний</text:span> <text:span text:style-name="T23">інтерфейс</text:span> в якому є <text:span text:style-name="T21">кілька функцій</text:span> а саме __<text:span text:style-name="T8">init__, Start, PLAY, send, select_file, History, </text:span><text:span text:style-name="T9">Conect, main, settings, end_settings, cleaning, seting_color</text:span>.</text:p>
      <text:p text:style-name="P23">1.1 <text:span text:style-name="T11">Опис програмної частини</text:span></text:p>
      <text:p text:style-name="P16">main – <text:span text:style-name="T11">відповідає за </text:span><text:span text:style-name="T12">реєстрацію на сайті, запускає в асинхроному режимі </text:span><text:span text:style-name="T16">receive_messages;</text:span></text:p>
      <text:p text:style-name="P16">re<text:span text:style-name="T16">ceive_messages – </text:span><text:span text:style-name="T12">приймає і зберігає повідомлення;</text:span></text:p>
      <text:p text:style-name="P17">messeg – <text:span text:style-name="T11">відповідає за відправку повідомлень;</text:span></text:p>
      <text:p text:style-name="P17">history – <text:span text:style-name="T11">дозволяє читати збережені текстові повідомлення;</text:span></text:p>
      <text:p text:style-name="P15"><text:span text:style-name="T12">п</text:span><text:span text:style-name="T11">овідомлення зберігаються в файлі </text:span>chat history.<text:span text:style-name="T21">db</text:span>;</text:p>
      <text:p text:style-name="P4">логи клієнта зберігаються в файл <text:span text:style-name="T22">app_log_client.</text:span><text:span text:style-name="T6">txt</text:span><text:span text:style-name="T5">.</text:span></text:p>
      <text:p text:style-name="P5"><text:span text:style-name="T25">1.2 </text:span><text:span text:style-name="T24">Опис коду графічного інтерфейсу</text:span></text:p>
      <text:p text:style-name="P7"><text:span text:style-name="T23">__</text:span><text:span text:style-name="T8">init__ - </text:span><text:span text:style-name="T26">відповідає за налаштування графічного інтерфейсу;</text:span></text:p>
      <text:p text:style-name="P18">Start – <text:span text:style-name="T11">відповідає за створення віджетів і створення вікна для реєстрації;</text:span></text:p>
      <text:p text:style-name="P18">PLAY – <text:span text:style-name="T11">запускає графічний інтер фейс і відключає від сервера по закінченню виконання програми;</text:span></text:p>
      <text:p text:style-name="P18">send – <text:span text:style-name="T11">активує метод</text:span> messeg <text:span text:style-name="T11">який відправляє повідомлення клієнту;</text:span></text:p>
      <text:p text:style-name="P8"><text:span text:style-name="T8">select_file – </text:span><text:span text:style-name="T27">відповідає за обрання файлу для відправки;</text:span></text:p>
      <text:p text:style-name="P19">History – <text:span text:style-name="T11">виводить повідомлення на екран;</text:span></text:p>
      <text:p text:style-name="P20">Conect – <text:span text:style-name="T11">відповідає за з’єднання із сервером;</text:span></text:p>
      <text:p text:style-name="P20">main –<text:span text:style-name="T11"> запускає головне вікно програми;</text:span></text:p>
      <text:p text:style-name="P21">settings –<text:span text:style-name="T11"> запускає вікно для налаштувань;</text:span></text:p>
      <text:p text:style-name="P22"><text:span text:style-name="T28">end_settings – </text:span><text:span text:style-name="T13">записує зміни в фаїл </text:span><text:span text:style-name="T28">settings.</text:span><text:span text:style-name="T29">json,</text:span><text:span text:style-name="T14"> запускає метод</text:span><text:span text:style-name="T29"> setting_color </text:span><text:span text:style-name="T14">і запускає метод </text:span><text:span text:style-name="T29">main</text:span><text:span text:style-name="T28">;</text:span></text:p>
      <text:p text:style-name="P22"><text:soft-page-break/><text:span text:style-name="T29">setting_color – </text:span><text:span text:style-name="T14">міняє колір кнопок;</text:span></text:p>
      <text:p text:style-name="P22"><text:span text:style-name="T29">cleaning – </text:span><text:span text:style-name="T14">прибирає з екрана всі віджети</text:span><text:span text:style-name="T11">.</text:span></text:p>
      <text:p text:style-name="P11">Розділ 2 Інструкція з використання</text:p>
      <text:p text:style-name="P3"><text:span text:style-name="T17">К</text:span>оли користувач запускає програму програма запитує ім’я користувача <text:span text:style-name="T21">якщо таке ім’я вже є попросить написати інше,</text:span> після введення можна буде виконувати інші дії.</text:p>
      <text:p text:style-name="P3"><text:span text:style-name="T17">Ч</text:span>итання повідомлень: треба <text:span text:style-name="T29">натиснути кнопку «подивитися повідомлення»</text:span>.</text:p>
      <text:p text:style-name="P9"><text:span text:style-name="T17">Н</text:span>аписання повідомлень: треба <text:span text:style-name="T30">на головномі вікні програми</text:span> вести отримувача, текст повідолення, <text:span text:style-name="T29">якщо</text:span> хочете відправити фаїл <text:span text:style-name="T29">треба обрати фаїл за допомогою кнопки «</text:span><text:span text:style-name="T30">Обрати фаїл»</text:span>, <text:s/><text:span text:style-name="T30">вкінці натисніть</text:span> «відправ<text:span text:style-name="T30">и</text:span>ти <text:span text:style-name="T30">повідомлення»</text:span>.</text:p>
      <text:p text:style-name="P10">Налаштування: для налаштування програми треба на головному меню натиснути «<text:span text:style-name="T31">Налаштування</text:span>», <text:span text:style-name="T31">потім за допомогою радіо кнопок задати налаштування, в кінці треба натиснути «закінчити».</text:span></text:p>
      <text:p text:style-name="P2">Всі повідомлення зберігаються в файлі <text:span text:style-name="T1">chat history.</text:span><text:span text:style-name="T7">db</text:span><text:span text:style-name="T1">, <text:s/></text:span>але з програми не можна відкрити файли тому вони зберігаються в тійже папці де знахдиться програма, всі повідомлення зберігаються автоматичн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6-12T11:23:46.481000000</dc:date>
    <meta:editing-duration>PT1H56M23S</meta:editing-duration>
    <meta:editing-cycles>9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35" meta:word-count="340" meta:character-count="2677" meta:non-whitespace-character-count="2355"/>
  </office:meta>
</office:document-meta>
</file>