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7d571" officeooo:paragraph-rsid="00149ab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49aba" officeooo:paragraph-rsid="00149ab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53cc3" officeooo:paragraph-rsid="00153cc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ca415" officeooo:paragraph-rsid="001ca41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cc107" officeooo:paragraph-rsid="001cc10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d37d2" officeooo:paragraph-rsid="001d37d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876d6" officeooo:paragraph-rsid="00238c9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 fo:break-before="page"/>
      <style:text-properties style:font-name="Times New Roman" fo:font-size="14pt" fo:language="ru" fo:country="RU" fo:font-weight="bold" officeooo:rsid="001ca415" officeooo:paragraph-rsid="001ca415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 fo:break-before="page"/>
      <style:text-properties style:font-name="Times New Roman" fo:font-size="14pt" fo:language="ru" fo:country="RU" fo:font-weight="bold" officeooo:rsid="0017d571" officeooo:paragraph-rsid="00149ab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 fo:break-before="page"/>
      <style:text-properties style:font-name="Times New Roman" fo:font-size="14pt" fo:language="ru" fo:country="RU" fo:font-weight="bold" officeooo:rsid="00209d90" officeooo:paragraph-rsid="00238c9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/>
      <style:text-properties style:font-name="Times New Roman" fo:font-size="14pt" fo:language="ru" fo:country="RU" fo:font-weight="bold" officeooo:rsid="001876d6" officeooo:paragraph-rsid="00238c9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1cc107" officeooo:paragraph-rsid="001cc10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1ad585" officeooo:paragraph-rsid="001ad58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27632f" officeooo:paragraph-rsid="001ad585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4899"/>
    </style:style>
    <style:style style:name="T3" style:family="text">
      <style:text-properties fo:language="en" fo:country="US" officeooo:rsid="0017da9e"/>
    </style:style>
    <style:style style:name="T4" style:family="text">
      <style:text-properties fo:language="en" fo:country="US" officeooo:rsid="0019c809"/>
    </style:style>
    <style:style style:name="T5" style:family="text">
      <style:text-properties fo:language="en" fo:country="US" officeooo:rsid="001e5e6a"/>
    </style:style>
    <style:style style:name="T6" style:family="text">
      <style:text-properties fo:language="en" fo:country="US" officeooo:rsid="0027632f"/>
    </style:style>
    <style:style style:name="T7" style:family="text">
      <style:text-properties fo:language="en" fo:country="US" officeooo:rsid="0027902f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ca415"/>
    </style:style>
    <style:style style:name="T10" style:family="text">
      <style:text-properties fo:language="ru" fo:country="RU" officeooo:rsid="0027632f"/>
    </style:style>
    <style:style style:name="T11" style:family="text">
      <style:text-properties officeooo:rsid="00162216"/>
    </style:style>
    <style:style style:name="T12" style:family="text">
      <style:text-properties officeooo:rsid="001ca415"/>
    </style:style>
    <style:style style:name="T13" style:family="text">
      <style:text-properties officeooo:rsid="001cc107"/>
    </style:style>
    <style:style style:name="T14" style:family="text">
      <style:text-properties officeooo:rsid="00218ff7"/>
    </style:style>
    <style:style style:name="T15" style:family="text">
      <style:text-properties officeooo:rsid="0017d571"/>
    </style:style>
    <style:style style:name="T16" style:family="text">
      <style:text-properties officeooo:rsid="0064ecef"/>
    </style:style>
    <style:style style:name="T17" style:family="text">
      <style:text-properties officeooo:rsid="0026435d"/>
    </style:style>
    <style:style style:name="T18" style:family="text">
      <style:text-properties officeooo:rsid="0027632f"/>
    </style:style>
    <style:style style:name="T19" style:family="text">
      <style:text-properties officeooo:rsid="001e5e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Сандул Максим (КН32)</text:p>
      <text:p text:style-name="P11">ЗМІСТ</text:p>
      <text:p text:style-name="P7"><text:span text:style-name="T15">Розділ 1 </text:span><text:span text:style-name="T17">О</text:span><text:span text:style-name="T15">пис програмного коду…………………………………………</text:span>сторінка 2 <text:span text:style-name="T16">Р</text:span><text:span text:style-name="T15">озділ 2 Інструкція з використання………………………………………</text:span>сторінка 3</text:p>
      <text:p text:style-name="P9">Розділ 1 <text:span text:style-name="T17">О</text:span>пис програмного коду</text:p>
      <text:p text:style-name="P1"><text:span text:style-name="T14">Ц</text:span>ей розділ присвячений опису коду ПЗ, це <text:span text:style-name="T14">п</text:span>отрібно щоб краще зрозуміти як він працює.</text:p>
      <text:p text:style-name="P2">Технічна документація: Програма це <text:span text:style-name="T11">консольний</text:span> інтерфейс <text:span text:style-name="T1">CLI <text:s/></text:span>в якому є <text:span text:style-name="T18">кілька функцій</text:span> а саме<text:span text:style-name="T1"> </text:span><text:span text:style-name="T2">main</text:span>,<text:span text:style-name="T1"> </text:span><text:span text:style-name="T3">receive_</text:span><text:span text:style-name="T4">messages, </text:span><text:span text:style-name="T6">messeg, history</text:span>.</text:p>
      <text:p text:style-name="P13">main – <text:span text:style-name="T8">відповідає за </text:span><text:span text:style-name="T9">реєстрацію на сайті, запускає в асинхроному режимі </text:span><text:span text:style-name="T12">receive_messages, </text:span><text:span text:style-name="T10">і обрання писати або читати повідомлення</text:span><text:span text:style-name="T12">;</text:span></text:p>
      <text:p text:style-name="P13">re<text:span text:style-name="T12">ceive_messages – </text:span><text:span text:style-name="T9">приймає і зберігає повідомлення;</text:span></text:p>
      <text:p text:style-name="P14">messeg – <text:span text:style-name="T8">відповідає за написання і відправку повідомлень;</text:span></text:p>
      <text:p text:style-name="P14">history – <text:span text:style-name="T8">дозволяє читати збережені текстові повідомлення;</text:span></text:p>
      <text:p text:style-name="P12"><text:span text:style-name="T9">п</text:span><text:span text:style-name="T8">овідомлення зберігаються в файлі </text:span>chat history.<text:span text:style-name="T18">db</text:span>;</text:p>
      <text:p text:style-name="P6">логи клієнта зберігаються в файл <text:span text:style-name="T19">app_log_client.</text:span><text:span text:style-name="T6">txt</text:span><text:span text:style-name="T5">.</text:span></text:p>
      <text:p text:style-name="P8">Розділ 2 Інструкція з використання</text:p>
      <text:p text:style-name="P4"><text:span text:style-name="T14">К</text:span>оли користувач запускає програму програма запитує ім’я користувача <text:span text:style-name="T18">якщо таке ім’я вже є попросить написати інше,</text:span> післявведення можна буде виконувати інші дії.</text:p>
      <text:p text:style-name="P4"><text:span text:style-name="T14">Ч</text:span>итання повідомлень: треба <text:span text:style-name="T13">вести</text:span> 1.</text:p>
      <text:p text:style-name="P5"><text:span text:style-name="T14">Н</text:span>аписання повідомлень: треба натиснути <text:span text:style-name="T1">enter </text:span>потім вести отримувача і текст повідолення, потім програма запитає чи хочете ви відправити фаїл, якщо хочете відправити фаїл відправте 1 потім тоді програма запитає повний шлях до файлу якщо ви не хочете відправляти фаїл відправте будь що крім 1.</text:p>
      <text:p text:style-name="P3">Всі повідомлення зберігаються в файлі <text:span text:style-name="T1">chat history.</text:span><text:span text:style-name="T7">db</text:span><text:span text:style-name="T1">, <text:s/></text:span>але з програми не можна відкрити файли тому вони зберігаються в тійже папці де знахдиться програма, всі повідомлення зберігаються автоматичн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5-28T19:04:24.777000000</dc:date>
    <meta:editing-duration>PT12M3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17" meta:word-count="203" meta:character-count="1504" meta:non-whitespace-character-count="1312"/>
  </office:meta>
</office:document-meta>
</file>